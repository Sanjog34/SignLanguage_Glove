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T1" style:family="text">
      <style:text-properties officeooo:rsid="000903c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Methodology</text:span></text:h>
      <text:p text:style-name="Text_20_body">The data collection system consists of eight flex sensors and an MPU6050 inertial measurement unit (IMU) mounted on the glove. The goal of the system is to capture <text:span text:style-name="Strong_20_Emphasis">static hand postures</text:span> by recording finger bending values along with wrist orientation and movement characteristics. The following subsections describe the full methodology used for sensor calibration, data acquisition, smoothing, and dataset preparation.</text:p>
      <text:p text:style-name="Horizontal_20_Line"/>
      <text:h text:style-name="Heading_20_2" text:outline-level="2"><text:span text:style-name="Strong_20_Emphasis">1. Hardware Setup</text:span></text:h>
      <text:p text:style-name="Text_20_body">The glove integrates:</text:p>
      <text:h text:style-name="Heading_20_3" text:outline-level="3"><text:span text:style-name="Strong_20_Emphasis">1.1 Flex Sensors (8 total)</text:span></text:h>
      <text:list xml:id="list1109200867" text:style-name="L1">
        <text:list-item>
          <text:p text:style-name="P2">Index finger: upper and lower joints</text:p>
        </text:list-item>
        <text:list-item>
          <text:p text:style-name="P2">Middle finger: upper and lower joints</text:p>
        </text:list-item>
        <text:list-item>
          <text:p text:style-name="P2">Ring finger: upper and lower joints</text:p>
        </text:list-item>
        <text:list-item>
          <text:p text:style-name="P2">Thumb: one sensor</text:p>
        </text:list-item>
        <text:list-item>
          <text:p text:style-name="P2">Pinky: one sensor</text:p>
        </text:list-item>
      </text:list>
      <text:p text:style-name="Text_20_body">Each sensor is connected to an ESP32 ADC pin.</text:p>
      <text:h text:style-name="Heading_20_3" text:outline-level="3"><text:span text:style-name="Strong_20_Emphasis">1.2 MPU6050 IMU</text:span></text:h>
      <text:p text:style-name="Text_20_body">The MPU6050 provides:</text:p>
      <text:list xml:id="list2622103841" text:style-name="L2">
        <text:list-item>
          <text:p text:style-name="P3"><text:span text:style-name="Strong_20_Emphasis">3-axis accelerometer data:</text:span> Ax, Ay, Az</text:p>
        </text:list-item>
        <text:list-item>
          <text:p text:style-name="P3"><text:span text:style-name="Strong_20_Emphasis">3-axis gyroscope data:</text:span> Gx, Gy, Gz</text:p>
        </text:list-item>
      </text:list>
      <text:p text:style-name="Text_20_body">The module communicates with the ESP32 via the <text:span text:style-name="Strong_20_Emphasis">I²C interface</text:span>.</text:p>
      <text:p text:style-name="Horizontal_20_Line"/>
      <text:h text:style-name="Heading_20_2" text:outline-level="2"><text:span text:style-name="Strong_20_Emphasis">2. Calibration</text:span></text:h>
      <text:h text:style-name="Heading_20_3" text:outline-level="3"><text:span text:style-name="Strong_20_Emphasis">2.1 Flex Sensor Calibration</text:span></text:h>
      <text:p text:style-name="Text_20_body">Each flex sensor was calibrated to determine its neutral baseline:</text:p>
      <text:list xml:id="list1491061435" text:style-name="L3">
        <text:list-item>
          <text:p text:style-name="P4">The sensor was sampled <text:span text:style-name="Strong_20_Emphasis">100 times</text:span> in a relaxed, unbent position.</text:p>
        </text:list-item>
        <text:list-item>
          <text:p text:style-name="P4">The average reading was stored as the <text:span text:style-name="Strong_20_Emphasis">baseline</text:span>.</text:p>
        </text:list-item>
        <text:list-item>
          <text:p text:style-name="P4">A 10-sample smoothing buffer was initialized using this baseline value.</text:p>
        </text:list-item>
      </text:list>
      <text:p text:style-name="Text_20_body"><text:soft-page-break/>This ensured stable and consistent sensor output before the actual readings began.</text:p>
      <text:h text:style-name="Heading_20_3" text:outline-level="3"><text:span text:style-name="Strong_20_Emphasis">2.2 MPU Calibration</text:span></text:h>
      <text:p text:style-name="Text_20_body">To reduce noise and sensor bias:</text:p>
      <text:list xml:id="list3897907579" text:style-name="L4">
        <text:list-item>
          <text:p text:style-name="P5">The glove was placed on a flat, stable surface.</text:p>
        </text:list-item>
        <text:list-item>
          <text:p text:style-name="P5">The MPU was read repeatedly to compute offsets for:</text:p>
          <text:list>
            <text:list-item>
              <text:p text:style-name="P5">Accelerometer drift</text:p>
            </text:list-item>
            <text:list-item>
              <text:p text:style-name="P5">Gyroscope zero-level bias</text:p>
            </text:list-item>
          </text:list>
        </text:list-item>
        <text:list-item>
          <text:p text:style-name="P5">These offsets were subtracted from every MPU reading in real time.</text:p>
        </text:list-item>
      </text:list>
      <text:p text:style-name="Text_20_body">This step ensured accurate orientation and motion readings even in static poses.</text:p>
      <text:p text:style-name="Horizontal_20_Line"/>
      <text:h text:style-name="Heading_20_2" text:outline-level="2"><text:span text:style-name="Strong_20_Emphasis">3. Signal Smoothing and Filtering</text:span></text:h>
      <text:h text:style-name="Heading_20_3" text:outline-level="3"><text:span text:style-name="Strong_20_Emphasis">3.1 Flex Sensor Smoothing</text:span></text:h>
      <text:p text:style-name="Text_20_body">A rolling average filter of size 10 was applied:</text:p>
      <text:list xml:id="list3472427876" text:style-name="L5">
        <text:list-item>
          <text:p text:style-name="P6">The oldest value in the buffer was removed.</text:p>
        </text:list-item>
        <text:list-item>
          <text:p text:style-name="P6">A new ADC reading was inserted.</text:p>
        </text:list-item>
        <text:list-item>
          <text:p text:style-name="P6">The average of the buffer produced the <text:span text:style-name="Strong_20_Emphasis">final smoothed flex value</text:span>.</text:p>
        </text:list-item>
      </text:list>
      <text:p text:style-name="Text_20_body">This eliminated small fluctuations and produced steady, reliable static measurements.</text:p>
      <text:h text:style-name="Heading_20_3" text:outline-level="3"><text:span text:style-name="Strong_20_Emphasis">3.2 MPU Smoothing</text:span></text:h>
      <text:p text:style-name="Text_20_body">Because IMU values can vary slightly even when the hand is still:</text:p>
      <text:list xml:id="list3910913513" text:style-name="L6">
        <text:list-item>
          <text:p text:style-name="P7">A small moving average filter was applied to both accelerometer and gyro readings.</text:p>
        </text:list-item>
        <text:list-item>
          <text:p text:style-name="P7">The filtered outputs represented the true static orientation of the wrist.</text:p>
        </text:list-item>
      </text:list>
      <text:p text:style-name="Horizontal_20_Line"/>
      <text:h text:style-name="Heading_20_2" text:outline-level="2"><text:span text:style-name="Strong_20_Emphasis">4. Conversion of Raw Sensor Data</text:span></text:h>
      <text:h text:style-name="Heading_20_3" text:outline-level="3"><text:span text:style-name="Strong_20_Emphasis">4.1 Flex Sensor Mapping</text:span></text:h>
      <text:p text:style-name="Text_20_body">The smoothed value was mapped into meaningful bending scales:</text:p>
      <text:list xml:id="list1092177780" text:style-name="L7">
        <text:list-item>
          <text:p text:style-name="P8"><text:span text:style-name="Strong_20_Emphasis">Type 0 sensors:</text:span> normalized scale 0–1000<text:span text:style-name="T1">(for less sensitive sensors)</text:span></text:p>
        </text:list-item>
        <text:list-item>
          <text:p text:style-name="P8"><text:span text:style-name="Strong_20_Emphasis">Type 1 sensors:</text:span> approximate bending angle 0–180</text:p>
        </text:list-item>
      </text:list>
      <text:p text:style-name="Text_20_body"><text:soft-page-break/>Negative values were clipped to zero.</text:p>
      <text:h text:style-name="Heading_20_3" text:outline-level="3"><text:span text:style-name="Strong_20_Emphasis">4.2 MPU Data Interpretation</text:span></text:h>
      <text:p text:style-name="Text_20_body">For each static sample:</text:p>
      <text:list xml:id="list1383108004" text:style-name="L8">
        <text:list-item>
          <text:p text:style-name="P9"><text:span text:style-name="Strong_20_Emphasis">Accelerometer readings (Ax, Ay, Az)</text:span> represented the orientation of the hand relative to gravity.</text:p>
        </text:list-item>
        <text:list-item>
          <text:p text:style-name="P9"><text:span text:style-name="Strong_20_Emphasis">Gyroscope readings (Gx, Gy, Gz)</text:span> indicated small rotational tendencies (ideally near zero in static poses).</text:p>
        </text:list-item>
      </text:list>
      <text:p text:style-name="Text_20_body">Both sets of values were included as features in the dataset.</text:p>
      <text:p text:style-name="Horizontal_20_Line"/>
      <text:h text:style-name="Heading_20_2" text:outline-level="2"><text:span text:style-name="Strong_20_Emphasis">5. Static Data Sampling Procedure</text:span></text:h>
      <text:p text:style-name="Text_20_body">Since only static gestures were recorded:</text:p>
      <text:list xml:id="list2535163767" text:style-name="L9">
        <text:list-item>
          <text:p text:style-name="P10">The user held a gesture steadily for a short time.</text:p>
        </text:list-item>
        <text:list-item>
          <text:p text:style-name="P10">Flex sensor values + MPU accel + MPU gyro were sampled.</text:p>
        </text:list-item>
        <text:list-item>
          <text:p text:style-name="P10">A delay of <text:span text:style-name="Strong_20_Emphasis">40 ms</text:span> ensured the ADC and IMU readings stabilized.</text:p>
        </text:list-item>
        <text:list-item>
          <text:p text:style-name="P10">Multiple samples were collected for each gesture to ensure repeatability.</text:p>
        </text:list-item>
      </text:list>
      <text:p text:style-name="Text_20_body">Each sampling cycle produced <text:span text:style-name="Strong_20_Emphasis">14 features</text:span>:</text:p>
      <text:list xml:id="list1381172136" text:style-name="L10">
        <text:list-item>
          <text:p text:style-name="P11">8 flex sensor outputs</text:p>
        </text:list-item>
        <text:list-item>
          <text:p text:style-name="P11">3 accelerometer values</text:p>
        </text:list-item>
        <text:list-item>
          <text:p text:style-name="P11">3 gyroscope values</text:p>
        </text:list-item>
      </text:list>
      <text:p text:style-name="Horizontal_20_Line"/>
      <text:h text:style-name="Heading_20_2" text:outline-level="2"><text:span text:style-name="Strong_20_Emphasis">6. Data Output Format</text:span></text:h>
      <text:p text:style-name="Text_20_body">Each sample was output in CSV format:</text:p>
      <text:p text:style-name="P1"><text:span text:style-name="Source_20_Text">idxUp, idxLow, midUp, midLow, ringUp, ringLow, thumb, pinky, Ax, Ay, Az, Gx, Gy, Gz</text:span></text:p>
      <text:p text:style-name="Text_20_body">Every line represented a single static posture sample.</text:p>
      <text:p text:style-name="Text_20_body"><text:span text:style-name="Strong_20_Emphasis"/></text:p>
      <text:h text:style-name="Heading_20_2" text:outline-level="2"><text:span text:style-name="Strong_20_Emphasis">Dataset Preparation for Machine Learning</text:span></text:h>
      <text:h text:style-name="Heading_20_3" text:outline-level="3"><text:span text:style-name="Strong_20_Emphasis">7.1 Logging and Organizing Data</text:span></text:h>
      <text:p text:style-name="Text_20_body">The CSV lines were logged from the ESP32 into a file using a serial terminal or Python script.</text:p>
      <text:h text:style-name="Heading_20_3" text:outline-level="3"><text:soft-page-break/><text:span text:style-name="Strong_20_Emphasis">7.2 Adding Labels</text:span></text:h>
      <text:p text:style-name="Text_20_body">Each group of samples representing a specific static gesture (e.g., “fist”, “thumbup”, “three”) was assigned an additional label column:</text:p>
      <text:p text:style-name="P1"><text:span text:style-name="Source_20_Text">idxUp, idxLow, ..., Gz, label</text:span></text:p>
      <text:h text:style-name="Heading_20_3" text:outline-level="3"><text:span text:style-name="Strong_20_Emphasis">7.3 Cleaning and Filtering</text:span></text:h>
      <text:list xml:id="list3993172768" text:style-name="L11">
        <text:list-item>
          <text:p text:style-name="P12">Outlier samples (hand moved accidentally) were removed.</text:p>
        </text:list-item>
        <text:list-item>
          <text:p text:style-name="P12">Samples with noisy MPU spikes were discarded.</text:p>
        </text:list-item>
        <text:list-item>
          <text:p text:style-name="P12">Duplicate or unstable entries were filtered out.</text:p>
        </text:list-item>
      </text:list>
      <text:h text:style-name="Heading_20_3" text:outline-level="3"><text:span text:style-name="Strong_20_Emphasis">7.4 Final Dataset</text:span></text:h>
      <text:p text:style-name="Text_20_body">All samples were merged into a single file (e.g., <text:span text:style-name="Source_20_Text">gesture_static_dataset.csv</text:span>) containing:</text:p>
      <text:list xml:id="list704301687" text:style-name="L12">
        <text:list-item>
          <text:p text:style-name="P13"><text:span text:style-name="Strong_20_Emphasis">14 features</text:span> (flex + MPU)</text:p>
        </text:list-item>
        <text:list-item>
          <text:p text:style-name="P13"><text:span text:style-name="Strong_20_Emphasis">1 label column</text:span></text:p>
        </text:list-item>
      </text:list>
      <text:p text:style-name="Text_20_body">This dataset was then used to train gesture classification models.</text:p>
      <text:p text:style-name="Horizontal_20_Line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21:04:40.893825989</meta:creation-date>
    <dc:date>2025-12-07T21:20:32.572458707</dc:date>
    <meta:editing-duration>PT5M4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82" meta:word-count="681" meta:character-count="4090" meta:non-whitespace-character-count="3531"/>
  </office:meta>
</office:document-meta>
</file>